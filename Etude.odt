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ekflare Primary" svg:font-family="'Geekflare Primary', system-ui, apple-system, 'Segoe UI', roboto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0.558cm" fo:margin-left="-1.683cm" table:align="left"/>
    </style:style>
    <style:style style:name="Tableau1.A" style:family="table-column">
      <style:table-column-properties style:column-width="1.64cm"/>
    </style:style>
    <style:style style:name="Tableau1.B" style:family="table-column">
      <style:table-column-properties style:column-width="1.931cm"/>
    </style:style>
    <style:style style:name="Tableau1.C" style:family="table-column">
      <style:table-column-properties style:column-width="2.196cm"/>
    </style:style>
    <style:style style:name="Tableau1.D" style:family="table-column">
      <style:table-column-properties style:column-width="1.879cm"/>
    </style:style>
    <style:style style:name="Tableau1.E" style:family="table-column">
      <style:table-column-properties style:column-width="2.355cm"/>
    </style:style>
    <style:style style:name="Tableau1.G" style:family="table-column">
      <style:table-column-properties style:column-width="2.381cm"/>
    </style:style>
    <style:style style:name="Tableau1.H" style:family="table-column">
      <style:table-column-properties style:column-width="1.905cm"/>
    </style:style>
    <style:style style:name="Tableau1.I" style:family="table-column">
      <style:table-column-properties style:column-width="2.09cm"/>
    </style:style>
    <style:style style:name="Tableau1.J" style:family="table-column">
      <style:table-column-properties style:column-width="2.30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Tableau1.2" style:family="table-row">
      <style:table-row-properties style:min-row-height="16.935cm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min-row-height="6.311cm"/>
    </style:style>
    <style:style style:name="Tableau1.4" style:family="table-row">
      <style:table-row-properties style:min-row-height="13.578cm"/>
    </style:style>
    <style:style style:name="Tableau1.7" style:family="table-row">
      <style:table-row-properties style:min-row-height="12.158cm"/>
    </style:style>
    <style:style style:name="Tableau1.8" style:family="table-row">
      <style:table-row-properties style:min-row-height="12.845cm"/>
    </style:style>
    <style:style style:name="Tableau1.10" style:family="table-row">
      <style:table-row-properties style:min-row-height="0.212cm"/>
    </style:style>
    <style:style style:name="P1" style:family="paragraph" style:parent-style-name="Table_20_Contents">
      <style:text-properties fo:font-weight="bold" officeooo:rsid="000cab2a" officeooo:paragraph-rsid="000cab2a" style:font-weight-asian="bold" style:font-weight-complex="bold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officeooo:paragraph-rsid="000cab2a" style:font-size-asian="9pt" style:font-size-complex="9pt"/>
    </style:style>
    <style:style style:name="P3" style:family="paragraph" style:parent-style-name="Table_20_Contents">
      <style:text-properties fo:font-size="9pt" officeooo:paragraph-rsid="000cab2a" style:font-size-asian="9pt" style:font-size-complex="9pt"/>
    </style:style>
    <style:style style:name="P4" style:family="paragraph">
      <loext:graphic-properties draw:fill="none" draw:fill-color="#ffffff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officeooo:paragraph-rsid="000cab2a" style:font-size-asian="9pt" style:font-size-complex="9pt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officeooo:paragraph-rsid="000cab2a" style:font-size-asian="9pt" style:font-size-complex="9pt"/>
    </style:style>
    <style:style style:name="P9" style:family="paragraph" style:parent-style-name="Text_20_body" style:list-style-name="L5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10" style:family="paragraph" style:parent-style-name="Text_20_body" style:list-style-name="L6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11" style:family="paragraph" style:parent-style-name="Text_20_body" style:list-style-name="L7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12" style:family="paragraph" style:parent-style-name="Text_20_body" style:list-style-name="L8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13" style:family="paragraph" style:parent-style-name="Heading_20_2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size="12pt" officeooo:rsid="000cab2a" officeooo:paragraph-rsid="000cab2a" style:font-size-asian="12pt" style:font-size-complex="12pt"/>
    </style:style>
    <style:style style:name="P14" style:family="paragraph" style:parent-style-name="Text_20_body" style:list-style-name="L9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15" style:family="paragraph" style:parent-style-name="Text_20_body" style:list-style-name="L10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16" style:family="paragraph" style:parent-style-name="Text_20_body" style:list-style-name="L11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17" style:family="paragraph" style:parent-style-name="Text_20_body" style:list-style-name="L12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18" style:family="paragraph" style:parent-style-name="Text_20_body" style:list-style-name="L1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19" style:family="paragraph" style:parent-style-name="Text_20_body" style:list-style-name="L14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20" style:family="paragraph" style:parent-style-name="Text_20_body" style:list-style-name="L15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size="9pt" officeooo:rsid="000d5ffc" officeooo:paragraph-rsid="000d5ffc" style:font-size-asian="9pt" style:font-size-complex="9pt"/>
    </style:style>
    <style:style style:name="P22" style:family="paragraph" style:parent-style-name="Text_20_body" style:list-style-name="L16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23" style:family="paragraph" style:parent-style-name="Text_20_body" style:list-style-name="L17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24" style:family="paragraph" style:parent-style-name="Text_20_body" style:list-style-name="L18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25" style:family="paragraph" style:parent-style-name="Text_20_body" style:list-style-name="L19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26" style:family="paragraph" style:parent-style-name="Text_20_body" style:list-style-name="L20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27" style:family="paragraph" style:parent-style-name="Text_20_body" style:list-style-name="L21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28" style:family="paragraph" style:parent-style-name="Text_20_body" style:list-style-name="L22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29" style:family="paragraph" style:parent-style-name="Text_20_body" style:list-style-name="L2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30" style:family="paragraph" style:parent-style-name="Text_20_body" style:list-style-name="L24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31" style:family="paragraph" style:parent-style-name="Text_20_body" style:list-style-name="L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officeooo:rsid="000d5ffc" officeooo:paragraph-rsid="000d5ffc" style:font-size-asian="9pt" style:font-size-complex="9pt"/>
    </style:style>
    <style:style style:name="P32" style:family="paragraph" style:parent-style-name="Text_20_body" style:list-style-name="L25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33" style:family="paragraph" style:parent-style-name="Text_20_body" style:list-style-name="L26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34" style:family="paragraph" style:parent-style-name="Text_20_body" style:list-style-name="L27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35" style:family="paragraph" style:parent-style-name="Text_20_body" style:list-style-name="L28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36" style:family="paragraph" style:parent-style-name="Text_20_body" style:list-style-name="L29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37" style:family="paragraph" style:parent-style-name="Text_20_body" style:list-style-name="L30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38" style:family="paragraph" style:parent-style-name="Text_20_body" style:list-style-name="L31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39" style:family="paragraph" style:parent-style-name="Text_20_body" style:list-style-name="L4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officeooo:rsid="000d5ffc" officeooo:paragraph-rsid="000d5ffc" style:font-size-asian="9pt" style:font-size-complex="9pt"/>
    </style:style>
    <style:style style:name="P40" style:family="paragraph" style:parent-style-name="Text_20_body" style:list-style-name="L32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41" style:family="paragraph" style:parent-style-name="Text_20_body" style:list-style-name="L3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42" style:family="paragraph" style:parent-style-name="Text_20_body">
      <style:text-properties fo:font-variant="normal" fo:text-transform="none" fo:color="#212121" loext:opacity="100%" style:font-name="Geekflare Primary" fo:font-size="9pt" fo:letter-spacing="normal" fo:font-style="normal" fo:font-weight="normal" officeooo:rsid="000d5ffc" officeooo:paragraph-rsid="000d5ffc" style:font-size-asian="9pt" style:font-size-complex="9pt"/>
    </style:style>
    <style:style style:name="P43" style:family="paragraph" style:parent-style-name="Table_20_Contents">
      <style:text-properties fo:font-size="9pt" officeooo:rsid="000d5ffc" officeooo:paragraph-rsid="000d5ffc" style:font-size-asian="9pt" style:font-size-complex="9pt"/>
    </style:style>
    <style:style style:name="P44" style:family="paragraph" style:parent-style-name="Text_20_body" style:list-style-name="L34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45" style:family="paragraph" style:parent-style-name="Text_20_body" style:list-style-name="L35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46" style:family="paragraph" style:parent-style-name="Text_20_body" style:list-style-name="L36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47" style:family="paragraph" style:parent-style-name="Text_20_body" style:list-style-name="L37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48" style:family="paragraph" style:parent-style-name="Text_20_body" style:list-style-name="L38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49" style:family="paragraph" style:parent-style-name="Text_20_body" style:list-style-name="L39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50" style:family="paragraph" style:parent-style-name="Text_20_body" style:list-style-name="L5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size="9pt" officeooo:rsid="000d5ffc" officeooo:paragraph-rsid="000d5ffc" style:font-size-asian="9pt" style:font-size-complex="9pt"/>
    </style:style>
    <style:style style:name="P51" style:family="paragraph" style:parent-style-name="Text_20_body" style:list-style-name="L40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52" style:family="paragraph" style:parent-style-name="Text_20_body" style:list-style-name="L41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53" style:family="paragraph" style:parent-style-name="Text_20_body" style:list-style-name="L42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54" style:family="paragraph" style:parent-style-name="Text_20_body" style:list-style-name="L4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55" style:family="paragraph" style:parent-style-name="Text_20_body" style:list-style-name="L44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56" style:family="paragraph" style:parent-style-name="Table_20_Contents">
      <style:text-properties officeooo:rsid="000d5ffc" officeooo:paragraph-rsid="000d5ffc"/>
    </style:style>
    <style:style style:name="P57" style:family="paragraph" style:parent-style-name="Text_20_body" style:list-style-name="L45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58" style:family="paragraph" style:parent-style-name="Text_20_body">
      <style:paragraph-properties fo:orphans="0" fo:widows="0"/>
      <style:text-properties fo:font-size="9pt" style:font-size-asian="9pt" style:font-size-complex="9pt"/>
    </style:style>
    <style:style style:name="P59" style:family="paragraph" style:parent-style-name="Text_20_body" style:list-style-name="L46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0" style:family="paragraph" style:parent-style-name="Text_20_body" style:list-style-name="L47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1" style:family="paragraph" style:parent-style-name="Text_20_body" style:list-style-name="L48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2" style:family="paragraph" style:parent-style-name="Text_20_body" style:list-style-name="L49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3" style:family="paragraph" style:parent-style-name="Text_20_body" style:list-style-name="L50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4" style:family="paragraph" style:parent-style-name="Text_20_body" style:list-style-name="L51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5" style:family="paragraph" style:parent-style-name="Text_20_body" style:list-style-name="L52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6" style:family="paragraph" style:parent-style-name="Text_20_body" style:list-style-name="L5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7" style:family="paragraph" style:parent-style-name="Text_20_body" style:list-style-name="L54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8" style:family="paragraph" style:parent-style-name="Text_20_body" style:list-style-name="L55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69" style:family="paragraph" style:parent-style-name="Text_20_body" style:list-style-name="L56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70" style:family="paragraph" style:parent-style-name="Text_20_body" style:list-style-name="L57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71" style:family="paragraph" style:parent-style-name="Text_20_body" style:list-style-name="L58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72" style:family="paragraph" style:parent-style-name="Table_20_Contents">
      <style:text-properties officeooo:rsid="000ef7ff" officeooo:paragraph-rsid="000ef7ff"/>
    </style:style>
    <style:style style:name="P73" style:family="paragraph" style:parent-style-name="Text_20_body" style:list-style-name="L59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74" style:family="paragraph" style:parent-style-name="Text_20_body" style:list-style-name="L60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75" style:family="paragraph" style:parent-style-name="Text_20_body" style:list-style-name="L61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76" style:family="paragraph" style:parent-style-name="Text_20_body" style:list-style-name="L62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77" style:family="paragraph" style:parent-style-name="Text_20_body" style:list-style-name="L6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78" style:family="paragraph" style:parent-style-name="Text_20_body" style:list-style-name="L64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79" style:family="paragraph" style:parent-style-name="Text_20_body" style:list-style-name="L65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80" style:family="paragraph" style:parent-style-name="Text_20_body" style:list-style-name="L66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81" style:family="paragraph" style:parent-style-name="Text_20_body" style:list-style-name="L67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82" style:family="paragraph" style:parent-style-name="Text_20_body" style:list-style-name="L68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212121" loext:opacity="100%" style:font-name="Geekflare Primary" fo:font-size="9pt" fo:letter-spacing="normal" fo:font-style="normal" fo:font-weight="normal" style:font-size-asian="9pt" style:font-size-complex="9pt"/>
    </style:style>
    <style:style style:name="P83" style:family="paragraph" style:parent-style-name="Standard">
      <style:text-properties officeooo:rsid="000c9e48"/>
    </style:style>
    <style:style style:name="P84" style:family="paragraph" style:parent-style-name="Standard">
      <style:text-properties style:text-underline-style="solid" style:text-underline-width="auto" style:text-underline-color="font-color" officeooo:rsid="0010c6e9" officeooo:paragraph-rsid="0010c6e9"/>
    </style:style>
    <style:style style:name="P85" style:family="paragraph" style:parent-style-name="Standard">
      <style:text-properties fo:color="#ff0000" loext:opacity="100%" style:text-underline-style="none" officeooo:rsid="0010c6e9" officeooo:paragraph-rsid="0010c6e9"/>
    </style:style>
    <style:style style:name="P86" style:family="paragraph" style:parent-style-name="Standard">
      <style:text-properties officeooo:rsid="0010c6e9" officeooo:paragraph-rsid="0010c6e9"/>
    </style:style>
    <style:style style:name="P87" style:family="paragraph" style:parent-style-name="Standard">
      <style:text-properties officeooo:rsid="0010c6e9" officeooo:paragraph-rsid="0013a602"/>
    </style:style>
    <style:style style:name="P88" style:family="paragraph" style:parent-style-name="Standard">
      <style:text-properties officeooo:rsid="0011521b" officeooo:paragraph-rsid="0013a602"/>
    </style:style>
    <style:style style:name="P89" style:family="paragraph" style:parent-style-name="Standard">
      <style:text-properties officeooo:rsid="0011e1c0" officeooo:paragraph-rsid="0013a602"/>
    </style:style>
    <style:style style:name="P90" style:family="paragraph" style:parent-style-name="Standard">
      <style:text-properties officeooo:rsid="00134aac" officeooo:paragraph-rsid="0013a602"/>
    </style:style>
    <style:style style:name="P91" style:family="paragraph" style:parent-style-name="Standard">
      <style:text-properties officeooo:rsid="0011521b" officeooo:paragraph-rsid="0011521b"/>
    </style:style>
    <style:style style:name="P92" style:family="paragraph" style:parent-style-name="Standard">
      <style:text-properties officeooo:rsid="00134aac" officeooo:paragraph-rsid="0011e1c0"/>
    </style:style>
    <style:style style:name="T1" style:family="text">
      <style:text-properties officeooo:rsid="0010648c"/>
    </style:style>
    <style:style style:name="T2" style:family="text">
      <style:text-properties officeooo:rsid="000d5ffc"/>
    </style:style>
    <style:style style:name="T3" style:family="text">
      <style:text-properties style:text-underline-style="none" officeooo:rsid="00169806"/>
    </style:style>
    <style:style style:name="T4" style:family="text">
      <style:text-properties officeooo:rsid="00169806"/>
    </style:style>
    <style:style style:name="T5" style:family="text">
      <style:text-properties officeooo:rsid="00134aac"/>
    </style:style>
    <style:style style:name="T6" style:family="text">
      <style:text-properties officeooo:rsid="0013a602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"><text:s text:c="2"/>Plex</text:p>
          </table:table-cell>
          <table:table-cell table:style-name="Tableau1.A1" office:value-type="string">
            <text:list text:style-name="L1">
              <text:list-header>
                <text:p text:style-name="P2">Prise en charge multiplate-forme</text:p>
              </text:list-header>
            </text:list>
            <text:p text:style-name="P3"><draw:frame text:anchor-type="paragraph" draw:z-index="0" draw:name="Cadre de texte 1" draw:style-name="gr1" draw:text-style-name="P4" svg:width="5.107cm" svg:height="1.463cm" svg:x="-1.688cm" svg:y="-4.237cm"><draw:text-box><text:p>Tableau Comparatif des différentes OS  Multimédia:</text:p></draw:text-box></draw:frame></text:p>
          </table:table-cell>
          <table:table-cell table:style-name="Tableau1.A1" office:value-type="string">
            <text:list xml:id="list1744719505" text:style-name="L2">
              <text:list-header>
                <text:p text:style-name="P5">Permet d’accéder aux fichiers multimédias depuis n’importe quel appareil</text:p>
              </text:list-header>
            </text:list>
            <text:p text:style-name="P6"/>
          </table:table-cell>
          <table:table-cell table:style-name="Tableau1.A1" office:value-type="string">
            <text:list xml:id="list844831314" text:style-name="L3">
              <text:list-header>
                <text:p text:style-name="P7">Prise en charge d’un large éventail de formats multimédias</text:p>
              </text:list-header>
            </text:list>
          </table:table-cell>
          <table:table-cell table:style-name="Tableau1.A1" office:value-type="string">
            <text:list xml:id="list1685315219" text:style-name="L4">
              <text:list-header>
                <text:p text:style-name="P8">Accélération matérielle à l’aide d’encodeurs matériels</text:p>
              </text:list-header>
            </text:list>
          </table:table-cell>
          <table:table-cell table:style-name="Tableau1.A1" office:value-type="string">
            <text:list xml:id="list2691911605" text:style-name="L5">
              <text:list-header>
                <text:p text:style-name="P9">Livré avec un lecteur audio permettant de lire les fichiers audio à leur débit binaire maximal</text:p>
              </text:list-header>
            </text:list>
            <text:p text:style-name="P6"/>
          </table:table-cell>
          <table:table-cell table:style-name="Tableau1.A1" office:value-type="string">
            <text:list text:style-name="L6">
              <text:list-header>
                <text:p text:style-name="P10">Prise en charge de l’accès à distance à votre serveur multimédia local depuis n’importe quel endroit du monde</text:p>
              </text:list-header>
            </text:list>
            <text:p text:style-name="P6"/>
          </table:table-cell>
          <table:table-cell table:style-name="Tableau1.A1" office:value-type="string">
            <text:list text:style-name="L7">
              <text:list-header>
                <text:p text:style-name="P11">Permet l’enregistrement de la télévision diffusée à partir d’un décodeur ou d’une antenne</text:p>
              </text:list-header>
            </text:list>
            <text:p text:style-name="P6"/>
          </table:table-cell>
          <table:table-cell table:style-name="Tableau1.A1" office:value-type="string">
            <text:list text:style-name="L8">
              <text:list-header>
                <text:p text:style-name="P12">Prise en charge du téléchargement de fichiers multimédias du serveur local vers un appareil mobile</text:p>
              </text:list-header>
            </text:list>
            <text:p text:style-name="P6"/>
          </table:table-cell>
          <table:table-cell table:style-name="Tableau1.J1" office:value-type="string">
            <text:list text:continue-numbering="true" text:style-name="L8">
              <text:list-header>
                <text:p text:style-name="P12">Accès à plus de 300 chaînes de télévision en direct et à plus de 50000 films et émissions de télévision à la demande entièrement gra<text:span text:style-name="T1">tuits</text:span></text:p>
              </text:list-header>
            </text:list>
          </table:table-cell>
        </table:table-row>
        <table:table-row table:style-name="Tableau1.2">
          <table:table-cell table:style-name="Tableau1.A2" office:value-type="string">
            <text:h text:style-name="P13" text:outline-level="2">Kodi</text:h>
          </table:table-cell>
          <table:table-cell table:style-name="Tableau1.A2" office:value-type="string">
            <text:list text:style-name="L9">
              <text:list-header>
                <text:p text:style-name="P14">Les utilisateurs peuvent obtenir un nouveau skin pour changer l’apparence de Kodi</text:p>
              </text:list-header>
            </text:list>
            <text:p text:style-name="P6"/>
          </table:table-cell>
          <table:table-cell table:style-name="Tableau1.A2" office:value-type="string">
            <text:list text:style-name="L10">
              <text:list-header>
                <text:p text:style-name="P15">Prend en charge tous les principaux formats de fichiers multimédias</text:p>
              </text:list-header>
            </text:list>
            <text:p text:style-name="P6"/>
          </table:table-cell>
          <table:table-cell table:style-name="Tableau1.A2" office:value-type="string">
            <text:list text:style-name="L11">
              <text:list-header>
                <text:p text:style-name="P16">Les utilisateurs peuvent jouer à des jeux sur Kodi</text:p>
              </text:list-header>
            </text:list>
            <text:p text:style-name="P6"/>
          </table:table-cell>
          <table:table-cell table:style-name="Tableau1.A2" office:value-type="string">
            <text:list text:style-name="L12">
              <text:list-header>
                <text:p text:style-name="P17"><text:span text:style-name="T2">I</text:span>nterface basée sur le web</text:p>
              </text:list-header>
            </text:list>
            <text:p text:style-name="P6"/>
          </table:table-cell>
          <table:table-cell table:style-name="Tableau1.A2" office:value-type="string">
            <text:list text:style-name="L13">
              <text:list-header>
                <text:p text:style-name="P18">Permet de regarder et d’enregistrer la télévision en direct</text:p>
              </text:list-header>
            </text:list>
            <text:p text:style-name="P6"/>
          </table:table-cell>
          <table:table-cell table:style-name="Tableau1.A2" office:value-type="string">
            <text:list text:style-name="L14">
              <text:list-header>
                <text:p text:style-name="P19">Des modules complémentaires gratuits peuvent être téléchargés pour ajouter des fonctionnalités supplémentaires</text:p>
              </text:list-header>
            </text:list>
            <text:p text:style-name="P6"/>
          </table:table-cell>
          <table:table-cell table:style-name="Tableau1.A2" office:value-type="string">
            <text:list text:style-name="L15">
              <text:list-header>
                <text:p text:style-name="P20">Prend en charge des centaines de télécommandes permettant aux utilisateurs de contrôler et d’accéder à leurs fichiers multimédias à l’aide de télécommandes</text:p>
              </text:list-header>
            </text:list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J2" office:value-type="string">
            <text:p text:style-name="P6"/>
          </table:table-cell>
        </table:table-row>
        <text:soft-page-break/>
        <table:table-row table:style-name="Tableau1.3">
          <table:table-cell table:style-name="Tableau1.A2" office:value-type="string">
            <text:list text:continue-list="list1744719505" text:style-name="L2">
              <text:list-header>
                <text:p text:style-name="P21">Emby</text:p>
              </text:list-header>
            </text:list>
          </table:table-cell>
          <table:table-cell table:style-name="Tableau1.A2" office:value-type="string">
            <text:list text:style-name="L16">
              <text:list-header>
                <text:p text:style-name="P22">Prise en charge multiplate-forme</text:p>
              </text:list-header>
            </text:list>
            <text:p text:style-name="P6"/>
          </table:table-cell>
          <table:table-cell table:style-name="Tableau1.A2" office:value-type="string">
            <text:list text:style-name="L17">
              <text:list-header>
                <text:p text:style-name="P23">Transcodage accéléré par le matériel</text:p>
              </text:list-header>
            </text:list>
            <text:p text:style-name="P6"/>
          </table:table-cell>
          <table:table-cell table:style-name="Tableau1.A2" office:value-type="string">
            <text:list text:style-name="L18">
              <text:list-header>
                <text:p text:style-name="P24">Prise en charge du téléchargement de fichiers multimédias sur des appareils mobiles pour un accès hors ligne</text:p>
              </text:list-header>
            </text:list>
            <text:p text:style-name="P6"/>
          </table:table-cell>
          <table:table-cell table:style-name="Tableau1.A2" office:value-type="string">
            <text:list text:style-name="L19">
              <text:list-header>
                <text:p text:style-name="P25">Intros cinéma avec bandes-annonces et intros personnalisées</text:p>
              </text:list-header>
            </text:list>
            <text:p text:style-name="P6"/>
          </table:table-cell>
          <table:table-cell table:style-name="Tableau1.A2" office:value-type="string">
            <text:list text:style-name="L20">
              <text:list-header>
                <text:p text:style-name="P26">Conversion des contenus multimédias dans des formats adaptés à la diffusion en continu</text:p>
              </text:list-header>
            </text:list>
            <text:p text:style-name="P6"/>
          </table:table-cell>
          <table:table-cell table:style-name="Tableau1.A2" office:value-type="string">
            <text:list text:style-name="L21">
              <text:list-header>
                <text:p text:style-name="P27">Contrôle vocal de l’application Emby à l’aide des appareils Amazon Echo ou Google Home</text:p>
              </text:list-header>
            </text:list>
            <text:p text:style-name="P6"/>
          </table:table-cell>
          <table:table-cell table:style-name="Tableau1.A2" office:value-type="string">
            <text:list text:style-name="L22">
              <text:list-header>
                <text:p text:style-name="P28">Synchronisation des médias sur des disques durs externes pour la sauvegarde, l’archivage et la conversion</text:p>
              </text:list-header>
            </text:list>
            <text:p text:style-name="P6"/>
          </table:table-cell>
          <table:table-cell table:style-name="Tableau1.A2" office:value-type="string">
            <text:list text:style-name="L23">
              <text:list-header>
                <text:p text:style-name="P29">Stockage des fichiers multimédias dans plusieurs résolutions pour permettre une diffusion directe depuis n’importe quel appareil</text:p>
              </text:list-header>
            </text:list>
            <text:p text:style-name="P6"/>
          </table:table-cell>
          <table:table-cell table:style-name="Tableau1.J2" office:value-type="string">
            <text:list text:style-name="L24">
              <text:list-header>
                <text:p text:style-name="P30">Prise en charge de la sauvegarde et de la restauration des configurations de serveur en toute simplicité et des migrations rapides vers de nouveaux environnements.</text:p>
              </text:list-header>
            </text:list>
            <text:p text:style-name="P6"/>
          </table:table-cell>
        </table:table-row>
        <table:table-row table:style-name="Tableau1.4">
          <table:table-cell table:style-name="Tableau1.A2" office:value-type="string">
            <text:list text:continue-list="list844831314" text:style-name="L3">
              <text:list-header>
                <text:p text:style-name="P31">Jellyfin</text:p>
              </text:list-header>
            </text:list>
            <text:p text:style-name="P6"/>
          </table:table-cell>
          <table:table-cell table:style-name="Tableau1.A2" office:value-type="string">
            <text:list text:style-name="L25">
              <text:list-header>
                <text:p text:style-name="P32">Prise en charge multiplate-forme</text:p>
              </text:list-header>
            </text:list>
            <text:p text:style-name="P6"/>
          </table:table-cell>
          <table:table-cell table:style-name="Tableau1.A2" office:value-type="string">
            <text:list text:style-name="L26">
              <text:list-header>
                <text:p text:style-name="P33">Il peut fonctionner comme un magnétoscope numérique pour enregistrer des émissions de télévision en direct</text:p>
              </text:list-header>
            </text:list>
            <text:p text:style-name="P6"/>
          </table:table-cell>
          <table:table-cell table:style-name="Tableau1.A2" office:value-type="string">
            <text:list text:style-name="L27">
              <text:list-header>
                <text:p text:style-name="P34">Transcodage matériel</text:p>
              </text:list-header>
            </text:list>
            <text:p text:style-name="P6"/>
          </table:table-cell>
          <table:table-cell table:style-name="Tableau1.A2" office:value-type="string">
            <text:list text:style-name="L28">
              <text:list-header>
                <text:p text:style-name="P35">Permet de regarder la télévision en direct</text:p>
              </text:list-header>
            </text:list>
            <text:p text:style-name="P6"/>
          </table:table-cell>
          <table:table-cell table:style-name="Tableau1.A2" office:value-type="string">
            <text:list text:style-name="L29">
              <text:list-header>
                <text:p text:style-name="P36">Comptes multiples et synchronisation mobile</text:p>
              </text:list-header>
            </text:list>
            <text:p text:style-name="P6"/>
          </table:table-cell>
          <table:table-cell table:style-name="Tableau1.A2" office:value-type="string">
            <text:list text:style-name="L30">
              <text:list-header>
                <text:p text:style-name="P37">Contrôle parental</text:p>
              </text:list-header>
            </text:list>
            <text:p text:style-name="P6"/>
          </table:table-cell>
          <table:table-cell table:style-name="Tableau1.A2" office:value-type="string">
            <text:list text:style-name="L31">
              <text:list-header>
                <text:p text:style-name="P38">Prise en charge de la diffusion à distance</text:p>
              </text:list-header>
            </text:list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J2" office:value-type="string">
            <text:p text:style-name="P6"/>
          </table:table-cell>
        </table:table-row>
        <text:soft-page-break/>
        <table:table-row>
          <table:table-cell table:style-name="Tableau1.A2" office:value-type="string">
            <text:list text:continue-list="list1685315219" text:style-name="L4">
              <text:list-header>
                <text:p text:style-name="P39">Serviio</text:p>
              </text:list-header>
            </text:list>
            <text:p text:style-name="Table_20_Contents"/>
          </table:table-cell>
          <table:table-cell table:style-name="Tableau1.A2" office:value-type="string">
            <text:list text:style-name="L32">
              <text:list-header>
                <text:p text:style-name="P40">Prise en charge d’un large éventail de formats multimédias</text:p>
              </text:list-header>
            </text:list>
            <text:p text:style-name="P6"/>
          </table:table-cell>
          <table:table-cell table:style-name="Tableau1.A2" office:value-type="string">
            <text:list text:style-name="L33">
              <text:list-header>
                <text:p text:style-name="P41">Transcodage en temps réel</text:p>
              </text:list-header>
            </text:list>
            <text:p text:style-name="P6"/>
          </table:table-cell>
          <table:table-cell table:style-name="Tableau1.A2" office:value-type="string">
            <text:p text:style-name="P42">Streaming en ligne</text:p>
            <text:p text:style-name="P43"/>
          </table:table-cell>
          <table:table-cell table:style-name="Tableau1.A2" office:value-type="string">
            <text:list text:style-name="L34">
              <text:list-header>
                <text:p text:style-name="P44">Prise en charge des sous-titres</text:p>
              </text:list-header>
            </text:list>
            <text:p text:style-name="P6"/>
          </table:table-cell>
          <table:table-cell table:style-name="Tableau1.A2" office:value-type="string">
            <text:list text:style-name="L35">
              <text:list-header>
                <text:p text:style-name="P45">Prise en charge des profils de rendu modifiables</text:p>
              </text:list-header>
            </text:list>
            <text:p text:style-name="P6"/>
          </table:table-cell>
          <table:table-cell table:style-name="Tableau1.A2" office:value-type="string">
            <text:list text:style-name="L36">
              <text:list-header>
                <text:p text:style-name="P46">Contrôle vocal du serveur média à l’aide de la compétence Alexa de Serviio</text:p>
              </text:list-header>
            </text:list>
            <text:p text:style-name="P6"/>
          </table:table-cell>
          <table:table-cell table:style-name="Tableau1.A2" office:value-type="string">
            <text:list text:style-name="L37">
              <text:list-header>
                <text:p text:style-name="P47">Prise en charge de la détention automatique du moteur de rendu et de l’attribution de profils par IP</text:p>
              </text:list-header>
            </text:list>
            <text:p text:style-name="P6"/>
          </table:table-cell>
          <table:table-cell table:style-name="Tableau1.A2" office:value-type="string">
            <text:list text:style-name="L38">
              <text:list-header>
                <text:p text:style-name="P48">Prise en charge des vignettes vidéo, des affiches de CD et de DVD</text:p>
              </text:list-header>
            </text:list>
            <text:p text:style-name="P6"/>
          </table:table-cell>
          <table:table-cell table:style-name="Tableau1.J2" office:value-type="string">
            <text:list text:style-name="L39">
              <text:list-header>
                <text:p text:style-name="P49">Catégorisation automatique des fichiers vidéo en films et/ou séries et marquage des derniers épisodes visionnés d’une série</text:p>
              </text:list-header>
            </text:list>
            <text:p text:style-name="P6"/>
          </table:table-cell>
        </table:table-row>
        <table:table-row>
          <table:table-cell table:style-name="Tableau1.A2" office:value-type="string">
            <text:list text:continue-list="list2691911605" text:style-name="L5">
              <text:list-header>
                <text:p text:style-name="P50">Madsonic</text:p>
              </text:list-header>
            </text:list>
          </table:table-cell>
          <table:table-cell table:style-name="Tableau1.A2" office:value-type="string">
            <text:list text:style-name="L40">
              <text:list-header>
                <text:p text:style-name="P51">Prise en charge multiplate-forme</text:p>
              </text:list-header>
            </text:list>
            <text:p text:style-name="P6"/>
          </table:table-cell>
          <table:table-cell table:style-name="Tableau1.A2" office:value-type="string">
            <text:list text:style-name="L41">
              <text:list-header>
                <text:p text:style-name="P52">Rééchantillonnage du débit de la musique en cas de bande passante limitée</text:p>
              </text:list-header>
            </text:list>
            <text:p text:style-name="P6"/>
          </table:table-cell>
          <table:table-cell table:style-name="Tableau1.A2" office:value-type="string">
            <text:list text:style-name="L42">
              <text:list-header>
                <text:p text:style-name="P53">Fonctionnalité de juke-box local</text:p>
              </text:list-header>
            </text:list>
            <text:p text:style-name="P6"/>
          </table:table-cell>
          <table:table-cell table:style-name="Tableau1.A2" office:value-type="string">
            <text:list text:style-name="L43">
              <text:list-header>
                <text:p text:style-name="P54">Service de conversation audio et vidéo</text:p>
              </text:list-header>
            </text:list>
            <text:p text:style-name="P6"/>
          </table:table-cell>
          <table:table-cell table:style-name="Tableau1.A2" office:value-type="string">
            <text:list text:style-name="L44">
              <text:list-header>
                <text:p text:style-name="P55">Intégration de services avancés avec Echonest</text:p>
              </text:list-header>
            </text:list>
            <text:p text:style-name="P6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ext:soft-page-break/>
        <table:table-row table:style-name="Tableau1.7">
          <table:table-cell table:style-name="Tableau1.A2" office:value-type="string">
            <text:p text:style-name="P56">Gerbera</text:p>
          </table:table-cell>
          <table:table-cell table:style-name="Tableau1.A2" office:value-type="string">
            <text:list text:style-name="L45">
              <text:list-header>
                <text:p text:style-name="P57">Transcodage à la volée des fichiers multimédias et génération de vignettes vidéo</text:p>
              </text:list-header>
            </text:list>
            <text:p text:style-name="P58"><text:line-break/></text:p>
          </table:table-cell>
          <table:table-cell table:style-name="Tableau1.A2" office:value-type="string">
            <text:list text:style-name="L46">
              <text:list-header>
                <text:p text:style-name="P59">Prise en charge multiplate-forme</text:p>
              </text:list-header>
            </text:list>
            <text:p text:style-name="P6"/>
          </table:table-cell>
          <table:table-cell table:style-name="Tableau1.A2" office:value-type="string">
            <text:list text:style-name="L47">
              <text:list-header>
                <text:p text:style-name="P60">Extraction de métadonnées à partir d’un grand nombre de fichiers multimédias</text:p>
              </text:list-header>
            </text:list>
            <text:p text:style-name="P6"/>
          </table:table-cell>
          <table:table-cell table:style-name="Tableau1.A2" office:value-type="string">
            <text:list text:style-name="L48">
              <text:list-header>
                <text:p text:style-name="P61">Disposition du serveur définie par l’utilisateur en fonction des métadonnées extraites</text:p>
              </text:list-header>
            </text:list>
            <text:p text:style-name="P6"/>
          </table:table-cell>
          <table:table-cell table:style-name="Tableau1.A2" office:value-type="string">
            <text:list text:style-name="L49">
              <text:list-header>
                <text:p text:style-name="P62">Prise en charge du scrobbling last.fm</text:p>
              </text:list-header>
            </text:list>
            <text:p text:style-name="P6"/>
          </table:table-cell>
          <table:table-cell table:style-name="Tableau1.A2" office:value-type="string">
            <text:list text:style-name="L50">
              <text:list-header>
                <text:p text:style-name="P63"><text:span text:style-name="T2">I</text:span>nterface Web avec une vue arborescente de votre base de données locale et du système de fichiers</text:p>
              </text:list-header>
            </text:list>
            <text:p text:style-name="P6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8">
          <table:table-cell table:style-name="Tableau1.A2" office:value-type="string">
            <text:p text:style-name="P43">Universale media server</text:p>
          </table:table-cell>
          <table:table-cell table:style-name="Tableau1.A2" office:value-type="string">
            <text:list text:style-name="L51">
              <text:list-header>
                <text:p text:style-name="P64">Ajustement automatique du débit en fonction de la vitesse du réseau</text:p>
              </text:list-header>
            </text:list>
            <text:p text:style-name="P6"/>
          </table:table-cell>
          <table:table-cell table:style-name="Tableau1.A2" office:value-type="string">
            <text:list text:style-name="L52">
              <text:list-header>
                <text:p text:style-name="P65">Qualité maximale automatique de la vidéo grâce au multiplexage</text:p>
              </text:list-header>
            </text:list>
            <text:p text:style-name="P6"/>
          </table:table-cell>
          <table:table-cell table:style-name="Tableau1.A2" office:value-type="string">
            <text:list text:style-name="L53">
              <text:list-header>
                <text:p text:style-name="P66">Navigation instantanée dans les fichiers</text:p>
              </text:list-header>
            </text:list>
            <text:p text:style-name="P6"/>
          </table:table-cell>
          <table:table-cell table:style-name="Tableau1.A2" office:value-type="string">
            <text:list text:style-name="L54">
              <text:list-header>
                <text:p text:style-name="P67">Prise en charge des sous-titres automatiques en direct sur tous les appareils</text:p>
              </text:list-header>
            </text:list>
            <text:p text:style-name="P6"/>
          </table:table-cell>
          <table:table-cell table:style-name="Tableau1.A2" office:value-type="string">
            <text:list text:style-name="L55">
              <text:list-header>
                <text:p text:style-name="P68">Transcodage des médias</text:p>
              </text:list-header>
            </text:list>
            <text:p text:style-name="P6"/>
          </table:table-cell>
          <table:table-cell table:style-name="Tableau1.A2" office:value-type="string">
            <text:list text:style-name="L56">
              <text:list-header>
                <text:p text:style-name="P69">Respect de la vie privée de l’utilisateur grâce à l’absence de collecte de données</text:p>
              </text:list-header>
            </text:list>
            <text:p text:style-name="P6"/>
          </table:table-cell>
          <table:table-cell table:style-name="Tableau1.A2" office:value-type="string">
            <text:list text:style-name="L57">
              <text:list-header>
                <text:p text:style-name="P70">Prise en charge de la diffusion en ligne</text:p>
              </text:list-header>
            </text:list>
            <text:p text:style-name="P6"/>
          </table:table-cell>
          <table:table-cell table:style-name="Tableau1.A2" office:value-type="string">
            <text:list text:style-name="L58">
              <text:list-header>
                <text:p text:style-name="P71">Prise en charge d’un grand nombre d’appareils : téléviseurs, appareils audio, consoles de jeux, smartphones, ordinateurs, etc</text:p>
              </text:list-header>
            </text:list>
            <text:p text:style-name="P6"/>
          </table:table-cell>
          <table:table-cell table:style-name="Tableau1.J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72">Myth.tv</text:p>
          </table:table-cell>
          <table:table-cell table:style-name="Tableau1.A2" office:value-type="string">
            <text:list text:style-name="L59">
              <text:list-header>
                <text:p text:style-name="P73">Les utilisateurs peuvent enregistrer des émissions de télévision en direct</text:p>
              </text:list-header>
            </text:list>
            <text:p text:style-name="P6"/>
          </table:table-cell>
          <table:table-cell table:style-name="Tableau1.A2" office:value-type="string">
            <text:list text:style-name="L60">
              <text:list-header>
                <text:p text:style-name="P74">Programmation manuelle des enregistrements</text:p>
              </text:list-header>
            </text:list>
            <text:p text:style-name="P6"/>
          </table:table-cell>
          <table:table-cell table:style-name="Tableau1.A2" office:value-type="string">
            <text:list text:style-name="L61">
              <text:list-header>
                <text:p text:style-name="P75">Programmation d’enregistrements à partir d’un service de référencement</text:p>
              </text:list-header>
            </text:list>
            <text:p text:style-name="P6"/>
          </table:table-cell>
          <table:table-cell table:style-name="Tableau1.A2" office:value-type="string">
            <text:list text:style-name="L62">
              <text:list-header>
                <text:p text:style-name="P76">Lecture de vidéos à partir du système de fichiers et de DVD</text:p>
              </text:list-header>
            </text:list>
            <text:p text:style-name="P6"/>
          </table:table-cell>
          <table:table-cell table:style-name="Tableau1.A2" office:value-type="string">
            <text:list text:style-name="L63">
              <text:list-header>
                <text:p text:style-name="P77">Suivi des épisodes enregistrés et évitement du réenregistrement des épisodes</text:p>
              </text:list-header>
            </text:list>
            <text:p text:style-name="P6"/>
          </table:table-cell>
          <table:table-cell table:style-name="Tableau1.A2" office:value-type="string">
            <text:list text:style-name="L64">
              <text:list-header>
                <text:p text:style-name="P78">Regarder la télévision en direct avec la possibilité de faire une pause, de revenir en arrière et d’avancer rapidement</text:p>
              </text:list-header>
            </text:list>
            <text:p text:style-name="P6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0">
          <table:table-cell table:style-name="Tableau1.A2" office:value-type="string">
            <text:p text:style-name="P72">Stremio</text:p>
          </table:table-cell>
          <table:table-cell table:style-name="Tableau1.A2" office:value-type="string">
            <text:list text:style-name="L65">
              <text:list-header>
                <text:p text:style-name="P79">Permet la diffusion en continu à partir de plusieurs sources sur une seule plateforme</text:p>
              </text:list-header>
            </text:list>
            <text:p text:style-name="P6"/>
          </table:table-cell>
          <table:table-cell table:style-name="Tableau1.A2" office:value-type="string">
            <text:list text:style-name="L66">
              <text:list-header>
                <text:p text:style-name="P80">Visualisation du calendrier des émissions dans votre bibliothèque</text:p>
              </text:list-header>
            </text:list>
            <text:p text:style-name="P6"/>
          </table:table-cell>
          <table:table-cell table:style-name="Tableau1.A2" office:value-type="string">
            <text:list text:style-name="L67">
              <text:list-header>
                <text:p text:style-name="P81">Permet de diffuser n’importe quel média sur un réseau local</text:p>
              </text:list-header>
            </text:list>
            <text:p text:style-name="P6"/>
          </table:table-cell>
          <table:table-cell table:style-name="Tableau1.A2" office:value-type="string">
            <text:list text:style-name="L68">
              <text:list-header>
                <text:p text:style-name="P82">Entièrement gratuit, sans frais cachés</text:p>
              </text:list-header>
            </text:list>
            <text:p text:style-name="P6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</table:table>
      <text:p text:style-name="P83"/>
      <text:p text:style-name="P84">Choix probable principale:</text:p>
      <text:p text:style-name="P85">Jellyfin</text:p>
      <text:p text:style-name="P86"/>
      <text:p text:style-name="P84">Matériel :</text:p>
      <text:p text:style-name="P86">Raspberry pi</text:p>
      <text:p text:style-name="P87">Carte S<text:span text:style-name="T3">D</text:span></text:p>
      <text:p text:style-name="P88">Alimentation de <text:span text:style-name="T4">R</text:span>aspberry pi</text:p>
      <text:p text:style-name="P88">C<text:span text:style-name="T5">â</text:span>ble RJ45</text:p>
      <text:p text:style-name="P86">Disque dur</text:p>
      <text:p text:style-name="P86">Câble Sata/USB</text:p>
      <text:p text:style-name="P86">DVD</text:p>
      <text:p text:style-name="P89">Lecteur DVD</text:p>
      <text:p text:style-name="P90">Câble pour <text:span text:style-name="T6">relier le Lecteur DVD à l’ordinateur</text:span></text:p>
      <text:p text:style-name="P91">télécommande</text:p>
      <text:p text:style-name="P91">Téléviseur</text:p>
      <text:p text:style-name="P91">Box internet/Commutateur</text:p>
      <text:p text:style-name="P92"/>
      <text:p text:style-name="P86">(Boîtier si possible le faire)</text:p>
      <text:p text:style-name="P86"/>
      <text:p text:style-name="P86"/>
      <text:p text:style-name="P86"/>
      <text:p text:style-name="P86"/>
      <text:p text:style-name="P8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ekflare Primary" svg:font-family="'Geekflare Primary', system-ui, apple-system, 'Segoe UI', roboto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0:14:12.900543400</meta:creation-date>
    <dc:date>2026-06-01T11:44:51.335856200</dc:date>
    <meta:editing-duration>PT56M23S</meta:editing-duration>
    <meta:editing-cycles>13</meta:editing-cycles>
    <meta:generator>LibreOffice/25.2.1.1$Windows_X86_64 LibreOffice_project/e538fb6403facdfd3db0250c3b3278236c675c2a</meta:generator>
    <meta:document-statistic meta:table-count="1" meta:image-count="0" meta:object-count="0" meta:page-count="6" meta:paragraph-count="97" meta:word-count="840" meta:character-count="5185" meta:non-whitespace-character-count="4511"/>
  </office:meta>
</office:document-meta>
</file>